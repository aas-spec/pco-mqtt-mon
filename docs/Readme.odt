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48e" officeooo:paragraph-rsid="0006e48e"/>
    </style:style>
    <style:style style:name="P2" style:family="paragraph" style:parent-style-name="Standard">
      <style:text-properties fo:language="en" fo:country="US" officeooo:rsid="0006e48e" officeooo:paragraph-rsid="0006e48e"/>
    </style:style>
    <style:style style:name="P3" style:family="paragraph" style:parent-style-name="Standard">
      <style:text-properties fo:language="en" fo:country="US" officeooo:rsid="0006e48e" officeooo:paragraph-rsid="0008e1af"/>
    </style:style>
    <style:style style:name="P4" style:family="paragraph" style:parent-style-name="Standard">
      <style:text-properties fo:language="en" fo:country="US" officeooo:rsid="0006e48e" officeooo:paragraph-rsid="0009a93c"/>
    </style:style>
    <style:style style:name="P5" style:family="paragraph" style:parent-style-name="Standard">
      <style:paragraph-properties fo:text-align="end" style:justify-single-word="false"/>
      <style:text-properties officeooo:rsid="0006e48e" officeooo:paragraph-rsid="0006e48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e1af"/>
    </style:style>
    <style:style style:name="T3" style:family="text">
      <style:text-properties fo:language="ru" fo:country="RU" officeooo:rsid="0009a93c"/>
    </style:style>
    <style:style style:name="T4" style:family="text">
      <style:text-properties fo:language="en" fo:country="US" officeooo:rsid="0009a93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language="ru" fo:country="RU"/>
    </style:style>
    <style:style style:name="T7" style:family="text">
      <style:text-properties fo:color="#c9211e" loext:opacity="100%" fo:language="ru" fo:country="RU" officeooo:rsid="0008e1af"/>
    </style:style>
    <style:style style:name="T8" style:family="text">
      <style:text-properties fo:color="#c9211e" loext:opacity="100%" fo:language="ru" fo:country="RU" fo:font-weight="bold" officeooo:rsid="0008e1af" style:font-weight-asian="bold" style:font-weight-complex="bold"/>
    </style:style>
    <style:style style:name="T9" style:family="text">
      <style:text-properties fo:color="#c9211e" loext:opacity="100%" fo:language="ru" fo:country="RU" fo:font-weight="normal" officeooo:rsid="0008e1af" style:font-weight-asian="normal" style:font-weight-complex="normal"/>
    </style:style>
    <style:style style:name="T10" style:family="text">
      <style:text-properties fo:color="#c9211e" loext:opacity="100%" fo:language="ru" fo:country="RU" officeooo:rsid="0009a93c"/>
    </style:style>
    <style:style style:name="T11" style:family="text">
      <style:text-properties fo:color="#c9211e" loext:opacity="100%" fo:language="ru" fo:country="RU" officeooo:rsid="000ce877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c9211e" loext:opacity="100%" fo:font-weight="bold" officeooo:rsid="0008e1af" style:font-weight-asian="bold" style:font-weight-complex="bold"/>
    </style:style>
    <style:style style:name="T14" style:family="text">
      <style:text-properties fo:color="#c9211e" loext:opacity="100%" officeooo:rsid="0008e1af"/>
    </style:style>
    <style:style style:name="T15" style:family="text">
      <style:text-properties officeooo:rsid="0008e1af"/>
    </style:style>
    <style:style style:name="T16" style:family="text">
      <style:text-properties fo:color="#000000" loext:opacity="100%"/>
    </style:style>
    <style:style style:name="T17" style:family="text">
      <style:text-properties officeooo:rsid="0009a93c"/>
    </style:style>
    <style:style style:name="T18" style:family="text">
      <style:text-properties officeooo:rsid="000fae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писание конфигурации <text:span text:style-name="T17">сервиса </text:span><text:span text:style-name="T18">PCO</text:span><text:span text:style-name="T4">-MQTT-Mon.exe</text:span></text:p>
      <text:p text:style-name="P1"/>
      <text:p text:style-name="P2"/>
      <text:p text:style-name="P2">{ <text:s/><text:span text:style-name="T6">Конфигурация представляет из себя файл в формате </text:span><text:span text:style-name="T5">JSON</text:span></text:p>
      <text:p text:style-name="P2"><text:s text:c="3"/>"MQTT":{ <text:span text:style-name="T11">Раздел параметров</text:span><text:span text:style-name="T6"> подключения к серверу </text:span><text:span text:style-name="T5">MQTT</text:span></text:p>
      <text:p text:style-name="P2"><text:s text:c="6"/>"Host":"10.3.XXX.XXX", <text:s/></text:p>
      <text:p text:style-name="P2"><text:s text:c="6"/>"Port":1883, </text:p>
      <text:p text:style-name="P2"><text:s text:c="6"/>"User":"XXXXXX",</text:p>
      <text:p text:style-name="P2"><text:s text:c="6"/>"Password":"XXXXX",</text:p>
      <text:p text:style-name="P2"><text:s text:c="6"/>"KeepAlive":30</text:p>
      <text:p text:style-name="P2"><text:s text:c="3"/>},</text:p>
      <text:p text:style-name="P2"><text:s text:c="3"/>"Services":[ <text:s text:c="3"/><text:span text:style-name="T11">Параметр - массив</text:span><text:span text:style-name="T6"> опис</text:span><text:span text:style-name="T11">ателей</text:span><text:span text:style-name="T6"> серви</text:span><text:span text:style-name="T11">сов</text:span></text:p>
      <text:p text:style-name="P2"><text:s text:c="6"/>{ <text:span text:style-name="T11">Раздел описывает конкретный сервис</text:span></text:p>
      <text:p text:style-name="P2"><text:s text:c="9"/>"Service":"Telegram", <text:s/><text:span text:style-name="T6">Наименование сервиса, </text:span><text:span text:style-name="T10">используется в имени файла лога</text:span></text:p>
      <text:p text:style-name="P2"><text:s text:c="9"/>"ServiceID":"*", <text:s/><text:span text:style-name="T5">ID </text:span><text:span text:style-name="T6">сервиса, используется для фильтрации, если указать * или пустое поле или данное поле отсутствует, то обрабатываются на входе все сообщения, иначе обрабатываются только те сообщения, у которых есть поле </text:span><text:span text:style-name="T5">ServiceID, </text:span><text:span text:style-name="T6">содержащее равное значение указанному </text:span></text:p>
      <text:p text:style-name="P2"><text:s text:c="9"/>"SrcTopic":"PCO/Export/Telegram/Events/#", <text:span text:style-name="T6">Здесь указывается топик </text:span><text:span text:style-name="T5">MQTT, </text:span><text:span text:style-name="T6">который можно задать в виде маски</text:span></text:p>
      <text:p text:style-name="P2"><text:s text:c="9"/>"DstTopic":"PCO/Monitor/Users/Telegram/Devices/Event", <text:span text:style-name="T6">Указывается топик для отправки сообщений, часть топика после последнего символа / можно перезадать в разделе </text:span><text:span text:style-name="T5">Translation </text:span><text:span text:style-name="T6">и </text:span><text:span text:style-name="T5">DefaultTranslation, </text:span><text:span text:style-name="T6">использу</text:span><text:span text:style-name="T11">я</text:span><text:span text:style-name="T6"> опцию "</text:span><text:span text:style-name="T5">OverrideTopic”: “Alarm”.</text:span><text:span text:style-name="T6"> </text:span><text:span text:style-name="T11">В</text:span><text:span text:style-name="T6"> результате сообщения будут отправляться в </text:span><text:span text:style-name="T5">PCO/Monitor/Users/Telegram/Devices/</text:span><text:span text:style-name="T12">Alarm</text:span></text:p>
      <text:p text:style-name="P2"><text:s text:c="9"/>"SrcCodePage":"<text:span text:style-name="T17">CP866</text:span>", <text:span text:style-name="T6">Задается кодировка источника, варианты могут быть любые, содержащие </text:span><text:span text:style-name="T10">коды </text:span><text:span text:style-name="T6"><text:s/>866 или 1251, например </text:span><text:span text:style-name="T5">CP1251 </text:span><text:span text:style-name="T6">или </text:span><text:span text:style-name="T5">CodePage866.</text:span><text:span text:style-name="T6"> </text:span><text:span text:style-name="T11">В</text:span><text:span text:style-name="T6"> случае, если указанного кода кодировки не найдено, будет </text:span><text:span text:style-name="T10">использована</text:span><text:span text:style-name="T6"> кодировка </text:span><text:span text:style-name="T5">UTF-8</text:span></text:p>
      <text:p text:style-name="P2"><text:s text:c="9"/>"DstCodePage":"UTF-8" <text:span text:style-name="T6">Кодиру</text:span><text:span text:style-name="T10">ет</text:span><text:span text:style-name="T6"> результирующие данные, аналогично предыдущему пункту</text:span></text:p>
      <text:p text:style-name="P2"><text:s text:c="6"/>},</text:p>
      <text:p text:style-name="P2"><text:s text:c="6"/>{</text:p>
      <text:p text:style-name="P2"><text:s text:c="9"/>"Service":"UVO",</text:p>
      <text:p text:style-name="P2"><text:s text:c="9"/>"ServiceID":"*",</text:p>
      <text:p text:style-name="P2"><text:s text:c="9"/>"SrcTopic":"PCO/Export/UVO/Events/#",</text:p>
      <text:p text:style-name="P2"><text:s text:c="9"/>"DstTopic":"PCO/Monitor/Users/UVO/Devices/Alarm",</text:p>
      <text:p text:style-name="P2"><text:s text:c="9"/>"SrcCodePage":"UTF-8",</text:p>
      <text:p text:style-name="P2"><text:s text:c="9"/>"DstCodePage":"UTF-8",</text:p>
      <text:p text:style-name="P2"><text:s text:c="9"/>"Translation":[ <text:s/><text:span text:style-name="T6">Содержит массив </text:span><text:span text:style-name="T11">правил</text:span><text:span text:style-name="T6"> перекодировки </text:span><text:span text:style-name="T11">сообщений</text:span></text:p>
      <text:p text:style-name="P2"><text:s text:c="12"/>{</text:p>
      <text:p text:style-name="P2"><text:s text:c="15"/>"CodeFrom":999, <text:s/><text:span text:style-name="T6">Код, который будет изменен в исходном сообщении</text:span></text:p>
      <text:p text:style-name="P4"><text:s text:c="15"/>"CodeTo":120, <text:span text:style-name="T6">Код, на который произойдет изменение</text:span><text:span text:style-name="T10">, </text:span><text:span text:style-name="T8">если код равен 0, то событие будет исключено из обработки</text:span><text:span text:style-name="T7">,</text:span></text:p>
      <text:p text:style-name="P2"><text:s text:c="15"/>"EventType":"Alert" <text:span text:style-name="T6">Тип события на который произойдет изменение, данный параметр может быть опущен, тогда замены типа события не произойдет</text:span></text:p>
      <text:p text:style-name="P3"><text:tab/> <text:s text:c="3"/>"OverrideTopic”:”<text:span text:style-name="T15">Event</text:span>”<text:span text:style-name="T1"> <text:s/></text:span><text:span text:style-name="T7">Топик, на который будет изменена последняя секция</text:span><text:span text:style-name="T14"> DstTopic</text:span><text:span text:style-name="T7"> данного <text:s/>сервиса, <text:s/>в данном случае топик будет изменен на <text:s/></text:span><text:span text:style-name="T5">PCO/Monitor/Users/UVO/Devices/</text:span><text:span text:style-name="T13">Event, </text:span><text:span text:style-name="T9">данный параметр необязателен, в случае отсутствия топик останется прежним</text:span></text:p>
      <text:p text:style-name="P2"><text:s text:c="12"/>},</text:p>
      <text:p text:style-name="P2"><text:s text:c="12"/>{</text:p>
      <text:p text:style-name="P2"><text:s text:c="15"/>"CodeFrom":988,</text:p>
      <text:p text:style-name="P2"><text:s text:c="15"/>"CodeTo":130,</text:p>
      <text:p text:style-name="P2"><text:soft-page-break/><text:s text:c="15"/>"EventType":"Alert"</text:p>
      <text:p text:style-name="P2"><text:s text:c="12"/>}</text:p>
      <text:p text:style-name="P2">],</text:p>
      <text:p text:style-name="P2"><text:s text:c="9"/>"DefaultTranslation":{ <text:span text:style-name="T7">Раздел содержит структуру данных описывающую </text:span><text:span text:style-name="T10">правила для ситуации</text:span><text:span text:style-name="T7">, </text:span><text:span text:style-name="T10">при которой</text:span><text:span text:style-name="T7"> сообщение не было обработано в разделе </text:span><text:span text:style-name="T14">Translation</text:span></text:p>
      <text:p text:style-name="P2"><text:s text:c="12"/>"CodeTo":<text:span text:style-name="T2">130</text:span><text:span text:style-name="T3">,</text:span><text:span text:style-name="T2"> </text:span><text:span text:style-name="T7">Указывает код, на который будет изменяться событие, </text:span><text:span text:style-name="T8">если код равен 0, то событие будет исключено из обработки</text:span><text:span text:style-name="T7">, </text:span><text:span text:style-name="T8">если данный параметр отсутствует, то код не изменится</text:span></text:p>
      <text:p text:style-name="P3"><text:span text:style-name="T7"><text:tab/></text:span><text:span text:style-name="T5"> </text:span><text:span text:style-name="T16">"EventType":"Alert",</text:span><text:span text:style-name="T6"> </text:span><text:span text:style-name="T7">указывает <text:s/>тип на который изменится событие</text:span></text:p>
      <text:p text:style-name="P3"><text:span text:style-name="T7"><text:tab/> </text:span>"OverrideTopic”:”Event”<text:span text:style-name="T6"> <text:s/></text:span><text:span text:style-name="T7">Топик, на который будет изменена последняя секция DstTopic данного <text:s/>сервиса, <text:s/>в данном случае топик будет изменен на <text:s/></text:span><text:span text:style-name="T6">PCO/Monitor/Users/UVO/Devices/</text:span><text:span text:style-name="T8">Event, </text:span><text:span text:style-name="T9">данный параметр необязателен, в случае отсутствия топик останется прежним</text:span></text:p>
      <text:p text:style-name="P2"><text:s text:c="9"/>}</text:p>
      <text:p text:style-name="P2"><text:s text:c="6"/>}</text:p>
      <text:p text:style-name="P2">]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23:42:46.427000000</meta:creation-date>
    <dc:date>2026-05-15T02:40:47.721483333</dc:date>
    <meta:editing-duration>PT3M2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46" meta:word-count="333" meta:character-count="3280" meta:non-whitespace-character-count="2614"/>
  </office:meta>
</office:document-meta>
</file>